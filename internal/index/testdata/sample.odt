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Architecture Review</text:h>
      <text:p>The persistence layer uses Postgres with row-level security.</text:p>
      <text:p>café espresso menu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